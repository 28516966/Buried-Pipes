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100000158A86AF696.png" manifest:media-type="image/png"/>
  <manifest:file-entry manifest:full-path="Pictures/100000000000031A000000D03D32AFC8.png" manifest:media-type="image/png"/>
  <manifest:file-entry manifest:full-path="Pictures/1000000000000318000000D250DEFBE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>
            <draw:frame draw:z-index="0" draw:name="Image 1" draw:style-name="gr1" draw:text-style-name="P1" svg:width="14.564cm" svg:height="9.136cm" svg:x="1.239cm" svg:y="0.213cm">
              <draw:image xlink:href="Pictures/100000000000021100000158A86AF696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1">
          <table:table-cell table:number-columns-repeated="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wheel loa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contact pressure = tyre pressur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C24]/[.C25]" office:value-type="float" office:value="0.15" calcext:value-type="float">
            <text:p>0.15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circular contact ar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SQRT([.C27]/PI())" office:value-type="float" office:value="0.218509686118416" calcext:value-type="float">
            <text:p>0.218509686118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us of contact are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roportion of radius for central quadra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[.C29]*[.C28]" office:value-type="float" office:value="0.109254843059208" calcext:value-type="float">
            <text:p>0.109254843059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us of central quadrants</text:p>
          </table:table-cell>
          <table:table-cell table:number-columns-repeated="2"/>
        </table:table-row>
        <table:table-row table:style-name="ro1">
          <table:table-cell table:number-columns-repeated="6"/>
          <table:table-cell>
            <draw:frame draw:z-index="1" draw:name="Image 2" draw:style-name="gr1" draw:text-style-name="P1" svg:width="16.436cm" svg:height="4.153cm" svg:x="2.01cm" svg:y="0.042cm">
              <draw:image xlink:href="Pictures/100000000000031A000000D03D32AFC8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Quadra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formula="of:=4*[.$C$30]/(3*PI())" office:value-type="float" office:value="0.0463691955456058" calcext:value-type="float">
            <text:p>0.04636919554560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r/3p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formula="of:=4*[.$C$30]/(3*PI())" office:value-type="float" office:value="0.0463691955456058" calcext:value-type="float">
            <text:p>0.046369195545605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0.25*PI()*[.C30]^2" office:value-type="float" office:value="0.009375" calcext:value-type="float">
            <text:p>0.009375</text:p>
          </table:table-cell>
          <table:table-cell office:value-type="string" calcext:value-type="string">
            <text:p>m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nnular Sec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2*PI()/12" office:value-type="float" office:value="0.523598775598299" calcext:value-type="float">
            <text:p>0.523598775598299</text:p>
          </table:table-cell>
          <table:table-cell office:value-type="string" calcext:value-type="string">
            <text:p>r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C38]*([.C28]^2-[.C30]^2)" office:value-type="float" office:value="0.01875" calcext:value-type="float">
            <text:p>0.01875</text:p>
          </table:table-cell>
          <table:table-cell office:value-type="string" calcext:value-type="string">
            <text:p>m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centroid</text:p>
          </table:table-cell>
          <table:table-cell table:formula="of:=2*SIN([.C38])*([.C28]^3-[.C30]^3)/(3*[.C38]*([.C28]^2-[.C30]^2))" office:value-type="float" office:value="0.16229218440962" calcext:value-type="float">
            <text:p>0.16229218440962</text:p>
          </table:table-cell>
          <table:table-cell office:value-type="string" calcext:value-type="string">
            <text:p>m</text:p>
          </table:table-cell>
          <table:table-cell table:number-columns-repeated="2"/>
          <table:table-cell>
            <draw:frame draw:z-index="2" draw:name="Image 3" draw:style-name="gr1" draw:text-style-name="P1" svg:width="19.107cm" svg:height="4.887cm" svg:x="2.064cm" svg:y="0.237cm">
              <draw:image xlink:href="Pictures/1000000000000318000000D250DEFBEE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09T23:27:03.997000000</meta:creation-date>
    <dc:date>2026-05-09T23:35:21.304000000</dc:date>
    <meta:editing-duration>PT8M16S</meta:editing-duration>
    <meta:editing-cycles>3</meta:editing-cycles>
    <meta:generator>LibreOffice/24.8.0.3$Windows_X86_64 LibreOffice_project/0bdf1299c94fe897b119f97f3c613e9dca6be583</meta:generator>
    <meta:document-statistic meta:table-count="1" meta:cell-count="42" meta:object-count="3"/>
  </office:meta>
</office:document-meta>
</file>